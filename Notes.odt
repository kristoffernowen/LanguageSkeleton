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sv" fo:country="SE"/>
    </style:style>
    <style:style style:name="P2" style:parent-style-name="Standard" style:family="paragraph">
      <style:text-properties fo:language="sv" fo:country="SE"/>
    </style:style>
    <style:style style:name="P3" style:parent-style-name="Standard" style:family="paragraph">
      <style:text-properties fo:language="sv" fo:country="SE"/>
    </style:style>
    <style:style style:name="P4" style:parent-style-name="Standard" style:family="paragraph">
      <style:text-properties fo:language="sv" fo:country="SE"/>
    </style:style>
    <style:style style:name="P5" style:parent-style-name="Standard" style:family="paragraph">
      <style:text-properties fo:language="sv" fo:country="SE"/>
    </style:style>
    <style:style style:name="P6" style:parent-style-name="Standard" style:family="paragraph">
      <style:text-properties fo:language="sv" fo:country="SE"/>
    </style:style>
    <style:style style:name="P7" style:parent-style-name="Standard" style:family="paragraph">
      <style:text-properties fo:language="sv" fo:country="SE"/>
    </style:style>
    <style:style style:name="P8" style:parent-style-name="Standard" style:family="paragraph">
      <style:text-properties fo:language="sv" fo:country="SE"/>
    </style:style>
    <style:style style:name="P9" style:parent-style-name="Standard" style:family="paragraph">
      <style:text-properties fo:language="sv" fo:country="SE"/>
    </style:style>
    <style:style style:name="P10" style:parent-style-name="Standard" style:family="paragraph">
      <style:text-properties fo:language="sv" fo:country="SE"/>
    </style:style>
    <style:style style:name="P11" style:parent-style-name="Standard" style:family="paragraph">
      <style:text-properties fo:language="sv" fo:country="SE"/>
    </style:style>
    <style:style style:name="T12" style:parent-style-name="Standardstycketeckensnitt" style:family="text">
      <style:text-properties fo:language="sv" fo:country="SE"/>
    </style:style>
  </office:automatic-styles>
  <office:body>
    <office:text text:use-soft-page-breaks="true">
      <text:p text:style-name="P1">## Architecture Experiments</text:p>
      <text:p text:style-name="P2"/>
      <text:p text:style-name="P3">### Verb Storage Optimization (TPH - Discarded)</text:p>
      <text:p text:style-name="P4">Initially explored Table-Per-Hierarchy to save disk space by deriving<text:s/></text:p>
      <text:p text:style-name="P5">regular conjugations from base forms.<text:s/></text:p>
      <text:p text:style-name="P6"/>
      <text:p text:style-name="P7">**Result:** 25% space saved but 400x slower compute + maintenance complexity.<text:s/></text:p>
      <text:p text:style-name="P8">Chose simplicity over premature optimization.<text:s/>(Says copilot)</text:p>
      <text:p text:style-name="P9">Changing models anyway, so taking the oppurtunity to use simpler entity for less headache.<text:s/></text:p>
      <text:p text:style-name="P10">Keeping separation between Domain and Data models, since domainmodels contain a lot of business logic.</text:p>
      <text:p text:style-name="P11"/>
      <text:p text:style-name="Standard"><text:span text:style-name="T12">**Learning:** Always measure before optimizing. Disk is cheap, complexity is expensiv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Kristoffer Nowen</dc:creator>
    <meta:creation-date>2009-04-16T11:32:00Z</meta:creation-date>
    <dc:date>2026-01-30T09:21:00Z</dc:date>
    <meta:template xlink:href="Normal.dotm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" meta:paragraph-count="11" meta:word-count="78" meta:character-count="601" meta:row-count="15" meta:non-whitespace-character-count="534"/>
  </office:meta>
</office:document-meta>
</file>